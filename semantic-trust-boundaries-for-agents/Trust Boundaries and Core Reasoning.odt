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Google Sans Text" svg:font-family="'Google Sans Text'"/>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Google Sans Text" fo:font-size="16pt" fo:font-style="normal" style:text-underline-style="none" fo:font-weight="bold" officeooo:rsid="0013a52f" officeooo:paragraph-rsid="0013a52f" style:text-blinking="false" fo:background-color="transparent" style:font-size-asian="16pt" style:font-weight-asian="bold" style:font-size-complex="16pt" style:font-weight-complex="bold"/>
    </style:style>
    <style:style style:name="P2"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Google Sans Text" fo:font-size="11pt" fo:font-style="normal" style:text-underline-style="none" fo:font-weight="normal" officeooo:rsid="0013a52f" officeooo:paragraph-rsid="0013a52f" style:text-blinking="false" fo:background-color="transparent"/>
    </style:style>
    <style:style style:name="P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Google Sans Text" fo:font-size="14pt" fo:font-style="normal" style:text-underline-style="none" fo:font-weight="bold" officeooo:rsid="00279b6b" officeooo:paragraph-rsid="00279b6b" style:text-blinking="false" fo:background-color="transparent" style:font-size-asian="14pt" style:font-weight-asian="bold" style:font-size-complex="14pt" style:font-weight-complex="bold"/>
    </style:style>
    <style:style style:name="P4"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Google Sans Text" fo:font-size="11pt" fo:font-style="normal" style:text-underline-style="none" fo:font-weight="normal" officeooo:rsid="00145fe4" officeooo:paragraph-rsid="001ce80a" style:text-blinking="false" fo:background-color="transparent"/>
    </style:style>
    <style:style style:name="P5"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Google Sans Text" fo:font-size="11pt" fo:font-style="normal" style:text-underline-style="none" fo:font-weight="normal" officeooo:rsid="001ef9f6" officeooo:paragraph-rsid="0020ac90" style:text-blinking="false" fo:background-color="transparent"/>
    </style:style>
    <style:style style:name="P6"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Google Sans Text" fo:font-size="11pt" fo:font-style="normal" style:text-underline-style="none" fo:font-weight="normal" officeooo:rsid="0020ac90" officeooo:paragraph-rsid="0020ac90" style:text-blinking="false" fo:background-color="transparent"/>
    </style:style>
    <style:style style:name="P7"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iberation Sans" fo:font-size="14pt" fo:font-style="normal" style:text-underline-style="none" fo:font-weight="bold" officeooo:rsid="002efb97" officeooo:paragraph-rsid="002efb97" style:text-blinking="false" fo:background-color="transparent" style:font-size-asian="14pt" style:font-weight-asian="bold" style:font-size-complex="14pt" style:font-weight-complex="bold"/>
    </style:style>
    <style:style style:name="P8"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Google Sans Text" fo:font-size="11pt" fo:font-style="normal" style:text-underline-style="none" fo:font-weight="normal" officeooo:rsid="001944a2" officeooo:paragraph-rsid="001944a2" style:text-blinking="false" fo:background-color="transparent"/>
    </style:style>
    <style:style style:name="P9"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Google Sans Text" fo:font-size="11pt" fo:font-style="normal" style:text-underline-style="none" fo:font-weight="normal" officeooo:rsid="001944a2" officeooo:paragraph-rsid="002bbd1e" style:text-blinking="false" fo:background-color="transparent"/>
    </style:style>
    <style:style style:name="P10"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Google Sans Text" fo:font-size="11pt" fo:font-style="normal" style:text-underline-style="none" fo:font-weight="normal" officeooo:rsid="002bbd1e" officeooo:paragraph-rsid="002bbd1e" style:text-blinking="false" fo:background-color="transparent"/>
    </style:style>
    <style:style style:name="P11"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Google Sans Text" fo:font-size="14pt" fo:font-style="normal" style:text-underline-style="none" fo:font-weight="bold" officeooo:rsid="003ab11d" officeooo:paragraph-rsid="003ab11d" style:text-blinking="false" fo:background-color="transparent" style:font-size-asian="14pt" style:font-weight-asian="bold" style:font-size-complex="14pt" style:font-weight-complex="bold"/>
    </style:style>
    <style:style style:name="P12"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Google Sans Text" fo:font-size="11pt" fo:font-style="normal" style:text-underline-style="none" fo:font-weight="normal" officeooo:rsid="00243b7e" officeooo:paragraph-rsid="00243b7e" style:text-blinking="false" fo:background-color="transparent"/>
    </style:style>
    <style:style style:name="P1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Google Sans Text" fo:font-size="11pt" fo:font-style="normal" style:text-underline-style="none" fo:font-weight="bold" officeooo:rsid="002d2ef2" officeooo:paragraph-rsid="002d2ef2" style:text-blinking="false" fo:background-color="transparent" style:font-weight-asian="bold" style:font-weight-complex="bold"/>
    </style:style>
    <style:style style:name="P14"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Google Sans Text" fo:font-size="11pt" fo:font-style="normal" style:text-underline-style="none" fo:font-weight="normal" officeooo:rsid="00257660" officeooo:paragraph-rsid="00257660" style:text-blinking="false" fo:background-color="transparent"/>
    </style:style>
    <style:style style:name="P15"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Google Sans Text" fo:font-size="11pt" fo:font-style="normal" style:text-underline-style="none" fo:font-weight="normal" officeooo:rsid="00244b78" officeooo:paragraph-rsid="00244b78" style:text-blinking="false" fo:background-color="transparent"/>
    </style:style>
    <style:style style:name="P16"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Google Sans Text" fo:font-size="11pt" fo:font-style="normal" style:text-underline-style="none" fo:font-weight="bold" officeooo:rsid="00243b7e" officeooo:paragraph-rsid="00243b7e" style:text-blinking="false" fo:background-color="transparent" style:font-weight-asian="bold" style:font-weight-complex="bold"/>
    </style:style>
    <style:style style:name="P17"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Google Sans Text" fo:font-size="11pt" fo:font-style="italic" style:text-underline-style="none" fo:font-weight="bold" officeooo:rsid="00257660" officeooo:paragraph-rsid="00257660" style:text-blinking="false" fo:background-color="transparent" style:font-style-asian="italic" style:font-weight-asian="bold" style:font-style-complex="italic" style:font-weight-complex="bold"/>
    </style:style>
    <style:style style:name="P18"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Google Sans Text" fo:font-size="11pt" fo:font-style="italic" style:text-underline-style="none" fo:font-weight="bold" officeooo:rsid="0036f40c" officeooo:paragraph-rsid="0036f40c" style:text-blinking="false" fo:background-color="transparent" style:font-style-asian="italic" style:font-weight-asian="bold" style:font-style-complex="italic" style:font-weight-complex="bold"/>
    </style:style>
    <style:style style:name="P19"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Google Sans Text" fo:font-size="11pt" fo:font-style="normal" style:text-underline-style="none" fo:font-weight="normal" officeooo:rsid="0031f6cd" officeooo:paragraph-rsid="0031f6cd" style:text-blinking="false" fo:background-color="transparent" style:font-style-asian="normal" style:font-weight-asian="normal" style:font-style-complex="normal" style:font-weight-complex="normal"/>
    </style:style>
    <style:style style:name="P20"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Google Sans Text" fo:font-size="11pt" fo:font-style="normal" style:text-underline-style="none" fo:font-weight="bold" officeooo:rsid="00244b78" officeooo:paragraph-rsid="00244b78" style:text-blinking="false" fo:background-color="transparent" style:font-weight-asian="bold" style:font-weight-complex="bold"/>
    </style:style>
    <style:style style:name="P21"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Google Sans Text" fo:font-size="11pt" fo:font-style="normal" style:text-underline-style="none" fo:font-weight="bold" officeooo:rsid="00257660" officeooo:paragraph-rsid="00257660" style:text-blinking="false" fo:background-color="transparent" style:font-weight-asian="bold" style:font-weight-complex="bold"/>
    </style:style>
    <style:style style:name="P22"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Google Sans Text" fo:font-size="11pt" fo:font-style="normal" style:text-underline-style="none" fo:font-weight="normal" officeooo:rsid="0031f6cd" officeooo:paragraph-rsid="0031f6cd" style:text-blinking="false" fo:background-color="transparent"/>
    </style:style>
    <style:style style:name="P2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Google Sans Text" fo:font-size="11pt" fo:font-style="normal" style:text-underline-style="none" fo:font-weight="normal" officeooo:rsid="002d2ef2" officeooo:paragraph-rsid="002d2ef2" style:text-blinking="false" fo:background-color="transparent"/>
    </style:style>
    <style:style style:name="P24"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Google Sans Text" fo:font-size="11pt" fo:font-style="normal" style:text-underline-style="none" fo:font-weight="bold" officeooo:rsid="002d2ef2" officeooo:paragraph-rsid="002d2ef2" style:text-blinking="false" fo:background-color="transparent" style:font-style-asian="normal" style:font-weight-asian="bold" style:font-style-complex="normal" style:font-weight-complex="bold"/>
    </style:style>
    <style:style style:name="P25"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Google Sans Text" fo:font-size="11pt" fo:font-style="italic" style:text-underline-style="none" fo:font-weight="bold" officeooo:rsid="0031f6cd" officeooo:paragraph-rsid="0031f6cd" style:text-blinking="false" fo:background-color="transparent" style:font-style-asian="italic" style:font-weight-asian="bold" style:font-style-complex="italic" style:font-weight-complex="bold"/>
    </style:style>
    <style:style style:name="P26"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Google Sans Text" fo:font-size="11pt" fo:font-style="normal" style:text-underline-style="none" fo:font-weight="normal" officeooo:rsid="0031f6cd" officeooo:paragraph-rsid="003a3505" style:text-blinking="false"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Google Sans Text" fo:font-size="11pt" fo:font-style="normal" style:text-underline-style="none" fo:font-weight="normal" officeooo:rsid="00145fe4" officeooo:paragraph-rsid="00145fe4" style:text-blinking="false" fo:background-color="transparent"/>
    </style:style>
    <style:style style:name="P28"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Google Sans Text" fo:font-size="11pt" fo:font-style="normal" style:text-underline-style="none" fo:font-weight="normal" officeooo:rsid="003ab11d" officeooo:paragraph-rsid="003ab11d" style:text-blinking="false" fo:background-color="transparent"/>
    </style:style>
    <style:style style:name="P29"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Google Sans Text" fo:font-size="11pt" fo:font-style="normal" style:text-underline-style="none" fo:font-weight="normal" officeooo:rsid="003b4707" officeooo:paragraph-rsid="003b4707" style:text-blinking="false" fo:background-color="transparent"/>
    </style:style>
    <style:style style:name="P30" style:family="paragraph" style:parent-style-name="Text_20_body">
      <style:paragraph-properties fo:margin-left="0in" fo:margin-right="0in" fo:margin-top="0in" fo:margin-bottom="0in" style:contextual-spacing="false" fo:line-height="138%" fo:text-indent="0in" style:auto-text-indent="false" style:writing-mode="lr-tb"/>
      <style:text-properties officeooo:paragraph-rsid="003b4707"/>
    </style:style>
    <style:style style:name="P31" style:family="paragraph" style:parent-style-name="Heading_20_2">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Google Sans Text" fo:font-size="14pt" fo:font-style="normal" style:text-underline-style="none" fo:font-weight="bold" officeooo:rsid="003cb14d" officeooo:paragraph-rsid="003cb14d" style:text-blinking="false" fo:background-color="transparent" style:font-size-asian="14pt" style:font-weight-asian="bold" style:font-size-complex="14pt" style:font-weight-complex="bold"/>
    </style:style>
    <style:style style:name="P32"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Google Sans Text" fo:font-size="14pt" fo:font-style="normal" style:text-underline-style="none" fo:font-weight="bold" style:text-blinking="false" fo:background-color="transparent" style:font-size-asian="14pt" style:font-weight-asian="bold" style:font-size-complex="14pt" style:font-weight-complex="bold"/>
    </style:style>
    <style:style style:name="P33" style:family="paragraph" style:parent-style-name="Heading_20_3">
      <style:paragraph-properties fo:margin-top="0in" fo:margin-bottom="0.1965in" style:contextual-spacing="false" fo:line-height="138%"/>
      <style:text-properties fo:color="#000000" loext:opacity="100%" style:font-name="Google Sans Text" fo:font-size="11pt" fo:font-weight="bold" style:font-weight-asian="bold" style:font-weight-complex="bold"/>
    </style:style>
    <style:style style:name="P34" style:family="paragraph" style:parent-style-name="Text_20_body">
      <style:paragraph-properties fo:line-height="138%"/>
      <style:text-properties fo:color="#000000" loext:opacity="100%" style:font-name="Google Sans Text" fo:font-size="11pt"/>
    </style:style>
    <style:style style:name="P35" style:family="paragraph" style:parent-style-name="Heading_20_3">
      <style:paragraph-properties fo:margin-top="0in" fo:margin-bottom="0.1965in" style:contextual-spacing="false" fo:line-height="138%"/>
      <style:text-properties fo:color="#000000" loext:opacity="100%" style:font-name="Google Sans Text" fo:font-size="11pt"/>
    </style:style>
    <style:style style:name="P36"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Google Sans Text" fo:font-size="11pt" fo:font-style="normal" style:text-underline-style="none" fo:font-weight="normal" style:text-blinking="false" fo:background-color="transparent"/>
    </style:style>
    <style:style style:name="T1" style:family="text">
      <style:text-properties officeooo:rsid="002efb97"/>
    </style:style>
    <style:style style:name="T2" style:family="text">
      <style:text-properties officeooo:rsid="0017ea6f"/>
    </style:style>
    <style:style style:name="T3" style:family="text">
      <style:text-properties officeooo:rsid="003ab11d"/>
    </style:style>
    <style:style style:name="T4" style:family="text">
      <style:text-properties officeooo:rsid="001ce80a"/>
    </style:style>
    <style:style style:name="T5" style:family="text">
      <style:text-properties officeooo:rsid="00163e80"/>
    </style:style>
    <style:style style:name="T6" style:family="text">
      <style:text-properties officeooo:rsid="001e446d"/>
    </style:style>
    <style:style style:name="T7" style:family="text">
      <style:text-properties officeooo:rsid="001e97ff"/>
    </style:style>
    <style:style style:name="T8" style:family="text">
      <style:text-properties officeooo:rsid="001ef9f6"/>
    </style:style>
    <style:style style:name="T9" style:family="text">
      <style:text-properties officeooo:rsid="001f5a02"/>
    </style:style>
    <style:style style:name="T10" style:family="text">
      <style:text-properties officeooo:rsid="00279b6b"/>
    </style:style>
    <style:style style:name="T11" style:family="text">
      <style:text-properties officeooo:rsid="002bbd1e"/>
    </style:style>
    <style:style style:name="T12" style:family="text">
      <style:text-properties officeooo:rsid="0020ac90"/>
    </style:style>
    <style:style style:name="T13" style:family="text">
      <style:text-properties style:font-name="Liberation Sans"/>
    </style:style>
    <style:style style:name="T14" style:family="text">
      <style:text-properties officeooo:rsid="003041be"/>
    </style:style>
    <style:style style:name="T15" style:family="text">
      <style:text-properties officeooo:rsid="002993f2"/>
    </style:style>
    <style:style style:name="T16" style:family="text">
      <style:text-properties officeooo:rsid="003126d2"/>
    </style:style>
    <style:style style:name="T17" style:family="text">
      <style:text-properties officeooo:rsid="00224963"/>
    </style:style>
    <style:style style:name="T18" style:family="text">
      <style:text-properties officeooo:rsid="002d2ef2"/>
    </style:style>
    <style:style style:name="T19" style:family="text">
      <style:text-properties officeooo:rsid="00244b78"/>
    </style:style>
    <style:style style:name="T20" style:family="text">
      <style:text-properties officeooo:rsid="0019a024"/>
    </style:style>
    <style:style style:name="T21" style:family="text">
      <style:text-properties officeooo:rsid="0029fc54"/>
    </style:style>
    <style:style style:name="T22" style:family="text">
      <style:text-properties officeooo:rsid="001b2ec7"/>
    </style:style>
    <style:style style:name="T23" style:family="text">
      <style:text-properties officeooo:rsid="00243b7e"/>
    </style:style>
    <style:style style:name="T24" style:family="text">
      <style:text-properties officeooo:rsid="00330035"/>
    </style:style>
    <style:style style:name="T25" style:family="text">
      <style:text-properties officeooo:rsid="0034e4dd"/>
    </style:style>
    <style:style style:name="T26" style:family="text">
      <style:text-properties fo:font-style="italic" fo:font-weight="bold" officeooo:rsid="002665a6" style:font-style-asian="italic" style:font-weight-asian="bold" style:font-style-complex="italic" style:font-weight-complex="bold"/>
    </style:style>
    <style:style style:name="T27" style:family="text">
      <style:text-properties fo:font-style="italic" officeooo:rsid="002665a6" style:font-style-asian="italic" style:font-style-complex="italic"/>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style:font-weight-asian="normal" style:font-weight-complex="normal"/>
    </style:style>
    <style:style style:name="T30" style:family="text">
      <style:text-properties officeooo:rsid="002e0498"/>
    </style:style>
    <style:style style:name="T31" style:family="text">
      <style:text-properties officeooo:rsid="0035983a"/>
    </style:style>
    <style:style style:name="T32" style:family="text">
      <style:text-properties style:font-weight-asian="normal" style:font-weight-complex="normal"/>
    </style:style>
    <style:style style:name="T33" style:family="text">
      <style:text-properties officeooo:rsid="0034e4dd" style:font-weight-asian="normal" style:font-weight-complex="normal"/>
    </style:style>
    <style:style style:name="T34" style:family="text">
      <style:text-properties officeooo:rsid="003960b4" style:font-weight-asian="normal" style:font-weight-complex="normal"/>
    </style:style>
    <style:style style:name="T35" style:family="text">
      <style:text-properties officeooo:rsid="0036f40c"/>
    </style:style>
    <style:style style:name="T36" style:family="text">
      <style:text-properties officeooo:rsid="0037f953"/>
    </style:style>
    <style:style style:name="T37" style:family="text">
      <style:text-properties officeooo:rsid="003960b4"/>
    </style:style>
    <style:style style:name="T38" style:family="text">
      <style:text-properties officeooo:rsid="0031f6cd"/>
    </style:style>
    <style:style style:name="T39" style:family="text">
      <style:text-properties officeooo:rsid="00396a45"/>
    </style:style>
    <style:style style:name="T40" style:family="text">
      <style:text-properties style:text-underline-style="solid" style:text-underline-width="auto" style:text-underline-color="font-color" style:font-style-asian="normal" style:font-weight-asian="normal" style:font-style-complex="normal" style:font-weight-complex="normal"/>
    </style:style>
    <style:style style:name="T41" style:family="text">
      <style:text-properties style:font-style-asian="normal" style:font-weight-asian="normal" style:font-style-complex="normal" style:font-weight-complex="normal"/>
    </style:style>
    <style:style style:name="T42" style:family="text">
      <style:text-properties officeooo:rsid="00396a45" style:font-style-asian="normal" style:font-weight-asian="normal" style:font-style-complex="normal" style:font-weight-complex="normal"/>
    </style:style>
    <style:style style:name="T43" style:family="text">
      <style:text-properties officeooo:rsid="003a3505"/>
    </style:style>
    <style:style style:name="T44" style:family="text">
      <style:text-properties fo:font-style="italic" officeooo:rsid="003a3505" style:font-style-asian="italic" style:font-style-complex="italic"/>
    </style:style>
    <style:style style:name="T45" style:family="text">
      <style:text-properties officeooo:rsid="003b4707"/>
    </style:style>
    <style:style style:name="T46" style:family="text">
      <style:text-properties fo:font-variant="normal" fo:text-transform="none" fo:color="#000000" loext:opacity="100%" style:text-line-through-style="none" style:text-line-through-type="none" style:font-name="Google Sans Text" fo:font-size="11pt" fo:font-style="normal" style:text-underline-style="none" fo:font-weight="normal" officeooo:rsid="003b4707" style:text-blinking="false" fo:background-color="transparent" loext:char-shading-value="0"/>
    </style:style>
    <style:style style:name="T47"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mantic <text:span text:style-name="T1">Controls</text:span> t<text:span text:style-name="T2">o </text:span><text:span text:style-name="T1">Harden </text:span>Agentic Reasoning</text:p>
      <text:p text:style-name="P2"/>
      <text:p text:style-name="P3"><text:span text:style-name="T3">Hardening</text:span> What Against Whom?</text:p>
      <text:p text:style-name="P4">Information security traditionally guards against internal and external actors accessing data or other resources without authorization. <text:span text:style-name="T4">Traditional </text:span>approaches involve: limiting access, restricting permissions, and tightly controlling how identity is determined. <text:span text:style-name="T5">Implicit in this model is the notion that internal and external actors can act arbitrarily and so steps must be taken to </text:span><text:span text:style-name="T1">secure</text:span><text:span text:style-name="T5"> systems against the (large) subset of those </text:span><text:span text:style-name="T4">arbitrary </text:span><text:span text:style-name="T5">actions that </text:span><text:span text:style-name="T4">might be</text:span><text:span text:style-name="T5"> unwanted, </text:span><text:span text:style-name="T4">dangerous, malicious, etc.</text:span></text:p>
      <text:p text:style-name="P4"/>
      <text:p text:style-name="P4"><text:span text:style-name="T5">But what happens when the discretionary “actor” is now a core component of the system itself?</text:span><text:span text:style-name="T6"> Previously, systems consisted </text:span><text:span text:style-name="T1">entirely of </text:span><text:span text:style-name="T6">“deterministic” code that could theoretically be constrained with precision. Now, with agentic systems, a probabilistic </text:span><text:span text:style-name="T1">reasoning</text:span><text:span text:style-name="T6"> “actor” </text:span><text:span text:style-name="T1">(AI, an LLM model endpoint)</text:span><text:span text:style-name="T6"> </text:span><text:span text:style-name="T1">is the beating heart </text:span><text:span text:style-name="T6">of the system </text:span><text:span text:style-name="T1">itself.</text:span><text:span text:style-name="T6"> Under this paradigm, </text:span><text:span text:style-name="T1">this core AI system component </text:span><text:span text:style-name="T7">may attempt to invoke tools when it should not, generate inaccurate or made-up information, or </text:span><text:span text:style-name="T8">generate</text:span><text:span text:style-name="T7"> data in a format not contemplated by the system. </text:span><text:span text:style-name="T9">Although t</text:span><text:span text:style-name="T8">hese unwanted system behaviors </text:span><text:span text:style-name="T9">may </text:span><text:span text:style-name="T10">occasionally </text:span><text:span text:style-name="T9">be the result of malicious actors, they are, more often than not, simply caused </text:span><text:span text:style-name="T1">by</text:span><text:span text:style-name="T10"> a particular set of non-malicious AI inputs </text:span><text:span text:style-name="T1">having unintended and unwanted AI outputs</text:span><text:span text:style-name="T9">.</text:span></text:p>
      <text:p text:style-name="P4"/>
      <text:p text:style-name="P5"><text:span text:style-name="T9">The risk of system unreliability, interestingly, has caused a governance dead zone. </text:span><text:span text:style-name="T1">Because</text:span><text:span text:style-name="T11">, i</text:span><text:span text:style-name="T9">f no </text:span><text:span text:style-name="T10">traditional </text:span><text:span text:style-name="T9">security boundary has been </text:span><text:span text:style-name="T1">broken</text:span><text:span text:style-name="T9"> (authentication, read-write permissions, etc.) </text:span><text:span text:style-name="T12">is a reliability failure </text:span><text:span text:style-name="T10">(i.e., an unwanted AI output)</text:span><text:span text:style-name="T12"> even InfoSec’s </text:span><text:span text:style-name="T10">responsibility</text:span><text:span text:style-name="T12">? M</text:span><text:span text:style-name="T10">aybe “</text:span><text:span text:style-name="T11">yes”</text:span><text:span text:style-name="T10"> </text:span><text:span text:style-name="T12">for bad tool invocation, but “</text:span><text:span text:style-name="T11">no”</text:span><text:span text:style-name="T12"> for “wrong” answers? </text:span><text:span text:style-name="T10">At present, these questions do not have agreed up answers.</text:span></text:p>
      <text:p text:style-name="P6"/>
      <text:p text:style-name="P7">Context Uncontrolled</text:p>
      <text:p text:style-name="P6"><text:span text:style-name="T13">In any ev</text:span>ent, irrespective of where responsibility ultimately <text:span text:style-name="T10">may lie</text:span>, the bigger problem is <text:span text:style-name="T14">that developers generally do not treat AI inputs or “context”</text:span> <text:span text:style-name="T15">as a governed boundary or threshold. “Context” in</text:span><text:span text:style-name="T14">cludes </text:span><text:span text:style-name="T16">those things that enter the reasoning space of an agent (i.e., are transmitted to an AI/LLM endpoint). F</text:span><text:span text:style-name="T14">or example,</text:span><text:span text:style-name="T15"> “</text:span><text:span text:style-name="T16">context” may include </text:span>retriev<text:span text:style-name="T17">ed documents</text:span>, static prompts, memory, <text:span text:style-name="T15">outputs from prior AI calls, </text:span>dynamic prompts, <text:span text:style-name="T18">and </text:span>prompt assemb<text:span text:style-name="T17">ly </text:span><text:span text:style-name="T14">materials</text:span><text:span text:style-name="T19">. </text:span></text:p>
      <text:p text:style-name="P8"/>
      <text:p text:style-name="P9">The contours of the problem, <text:span text:style-name="T15">however, </text:span>also <text:span text:style-name="T15">help us draw</text:span> the blueprint for the solution. <text:span text:style-name="T16">A number of</text:span> <text:span text:style-name="T15">context</text:span> <text:span text:style-name="T15">variables which cause unwanted AI outputs have </text:span><text:span text:style-name="T16">been identified</text:span><text:span text:style-name="T20"> </text:span><text:span text:style-name="T16">and studied in details through </text:span><text:span text:style-name="T20">the collective efforts of university researchers, the frontier LLM labs, and various AI security vendors. These </text:span><text:span text:style-name="T21">context variables </text:span><text:span text:style-name="T20">include, among other things: the length of admitted contex</text:span><text:span text:style-name="T21">t</text:span><text:span text:style-name="T20">, the number of tasks given to the </text:span><text:span text:style-name="T21">LLM</text:span><text:span text:style-name="T20">, the nature of the tasks given to the </text:span><text:span text:style-name="T21">LLM</text:span><text:span text:style-name="T20"> (e.g., whether th</text:span><text:span text:style-name="T21">ose tasks</text:span><text:span text:style-name="T20"> are conflicting), </text:span><text:span text:style-name="T22">the extent to which data and instructions are deeply commingled, </text:span><text:span text:style-name="T20">and the overall complexity of the materials that comprise the AI inputs. </text:span><text:span text:style-name="T21">ALL</text:span><text:span text:style-name="T22"> of these “</text:span><text:span text:style-name="T21">semantic trust boundaries”</text:span><text:span text:style-name="T17"> can </text:span><text:soft-page-break/><text:span text:style-name="T17">be </text:span><text:span text:style-name="T20">control</text:span><text:span text:style-name="T17">led</text:span><text:span text:style-name="T20">, shape</text:span><text:span text:style-name="T17">d</text:span><text:span text:style-name="T20">, and inspect</text:span><text:span text:style-name="T17">ed</text:span><text:span text:style-name="T20"> </text:span><text:span text:style-name="T17">using</text:span><text:span text:style-name="T20"> deterministic code </text:span><text:span text:style-name="T22">that is added to </text:span><text:span text:style-name="T21">an</text:span><text:span text:style-name="T20"> agentic </text:span><text:span text:style-name="T21">software</text:span><text:span text:style-name="T20"> harness.</text:span></text:p>
      <text:p text:style-name="P9"/>
      <text:p text:style-name="P10"><text:span text:style-name="T16">F</text:span>or AI agents, the answer to the question “Securing What Against Whom” means securing the core reasoning function of the agent (the <text:span text:style-name="T16">AI/</text:span>LLM model endpoint) against the various types of context <text:span text:style-name="T18">generated by the system (or provided by the user) </text:span>that trigger the failure <text:span text:style-name="T18">modes</text:span> noted above. Stated differently, the reasoning area of the AI agent is sacred ground <text:span text:style-name="T16">and highly consequential, </text:span>and <text:span text:style-name="T16">so</text:span> admission to it should be strictly governed and gated.</text:p>
      <text:p text:style-name="P9"/>
      <text:p text:style-name="P11">Context Controlled</text:p>
      <text:p text:style-name="P9"><text:span text:style-name="T16">Below are some of</text:span><text:span text:style-name="T23"> the </text:span><text:span text:style-name="T16">problematic context variables</text:span><text:span text:style-name="T23">, </text:span><text:span text:style-name="T16">together with </text:span><text:span text:style-name="T3">some </text:span><text:span text:style-name="T24">helpful </text:span><text:a xlink:type="simple" xlink:href="https://en.wikipedia.org/wiki/Chengyu" text:style-name="Internet_20_link" text:visited-style-name="Visited_20_Internet_20_Link"><text:span text:style-name="T24">Chengyu</text:span></text:a><text:span text:style-name="T24">, and ideas for </text:span><text:span text:style-name="T16">potential ways to </text:span><text:span text:style-name="T25">treat </text:span><text:span text:style-name="T3">problematic context dimension</text:span><text:span text:style-name="T25"> a governed trust boundar</text:span><text:span text:style-name="T3">ies.</text:span></text:p>
      <text:p text:style-name="P12"/>
      <text:p text:style-name="P13">Large Context</text:p>
      <text:p text:style-name="P14"><text:span text:style-name="T26">Needle in a haystack… but the haystack talks</text:span><text:span text:style-name="T27">.</text:span> </text:p>
      <text:p text:style-name="P15"><text:span text:style-name="T28">Problem</text:span>: <text:span text:style-name="T18">If admitted context is within the context window of the model endpoint, it can still be too big for the AI endpoint to successfully reason across. Although it is often convenient for developers to <text:line-break/>“send all the context at once,” large admitted context can cause LLM endpoints to lose focus, miss key facts, or become confused. </text:span></text:p>
      <text:p text:style-name="P15"><text:span text:style-name="T28">Controls</text:span>: <text:span text:style-name="T18">It is useful to use deterministic code to enforce a strict upper limit to context size and to break apart those processing pieces that can be done separately. If the larger picture is needed for the processing, there are often ways to provide the AI endpoint with a dramatically smaller problem statement or map, rather than all possible context. </text:span></text:p>
      <text:p text:style-name="P12"/>
      <text:p text:style-name="P16">Conflicting Task Modes</text:p>
      <text:p text:style-name="P17">Too many hats, but only one head.</text:p>
      <text:p text:style-name="P15"><text:span text:style-name="T28">Problem</text:span>: <text:span text:style-name="T18">LLMs, like humans, do not do their best work when given competing task modes in the same assignment. “Make it big, but also make it small. <text:s/>Make it complex, but it also must be simple.”</text:span></text:p>
      <text:p text:style-name="P15"><text:span text:style-name="T29">Controls</text:span>: <text:span text:style-name="T30">In the agentic orchestrator, or </text:span><text:span text:style-name="T25">any </text:span><text:span text:style-name="T30">other module </text:span><text:span text:style-name="T25">that is allowed to call LLM endpoints</text:span><text:span text:style-name="T30">, one </text:span><text:span text:style-name="T24">can, and should, use deterministic code to</text:span><text:span text:style-name="T30"> limit </text:span><text:span text:style-name="T25">each</text:span><text:span text:style-name="T30"> LLM endpoint call to as few tasks as possible, in </text:span><text:span text:style-name="T25">while still </text:span><text:span text:style-name="T30">achiev</text:span><text:span text:style-name="T25">ing</text:span><text:span text:style-name="T30"> the processing goals. For example, for a system that does ideation, research, and writing, each of those tasks are probably best suited as either separate AI calls, or possibly entire separate workflows. </text:span><text:span text:style-name="T25">This approach to structure is a control that can live as deterministic code within the agent and as part of agent architecture.</text:span></text:p>
      <text:p text:style-name="P12"/>
      <text:p text:style-name="P16">Deep Co-mingling <text:span text:style-name="T19">of </text:span>Instructions and Data</text:p>
      <text:p text:style-name="P17">Everything is soup.</text:p>
      <text:p text:style-name="P15"><text:soft-page-break/><text:span text:style-name="T29">Problem</text:span>: <text:span text:style-name="T24">One of the inescapable issues with LLM-powered agents is that, at some level, instructions and data musts be combined. However, that doesn’t mean they need to be deeply intertwined like Spaghetti. In fact, the spaghetti approach is likely to </text:span><text:span text:style-name="T25">confuse the </text:span><text:span text:style-name="T24">LLM endpoint </text:span><text:span text:style-name="T25">so that </text:span><text:span text:style-name="T24">data </text:span><text:span text:style-name="T25">ends up being</text:span><text:span text:style-name="T24"> </text:span><text:span text:style-name="T25">treated </text:span><text:span text:style-name="T24">as instru</text:span><text:span text:style-name="T25">ctions and </text:span><text:span text:style-name="T24">instruction</text:span><text:span text:style-name="T25">s</text:span><text:span text:style-name="T24"> as data. </text:span><text:span text:style-name="T25">The more </text:span><text:span text:style-name="T31">context resembles spaghetti</text:span><text:span text:style-name="T25">, the more injectable th</text:span><text:span text:style-name="T31">at </text:span><text:span text:style-name="T25">context is.</text:span></text:p>
      <text:p text:style-name="P15"><text:span text:style-name="T28">Controls</text:span><text:span text:style-name="T32">: </text:span><text:span text:style-name="T33">Code modules that are allowed to assemble context should uniformly ensure that there is a clean separation between instructions and data (a typical approach is to have instructions at the beginning, followed by data), and that both are clearly </text:span><text:span text:style-name="T34">labeled</text:span><text:span text:style-name="T33">. This of course doesn’t guarantee that the LLM endpoint will keep them straight, but it will lower the incidence of instruction-data confusion. This is a control that is instantiated with deterministic code.</text:span></text:p>
      <text:p text:style-name="P12"/>
      <text:p text:style-name="P16">Overall Complexity</text:p>
      <text:p text:style-name="P18">The map becomes the maze</text:p>
      <text:p text:style-name="P19"><text:span text:style-name="T28">Problem</text:span>: <text:span text:style-name="T31">Complex context is more likely to confuse LLMs. Although there is some overlap between this variable and some others (such as context length and conflicting task modes), it still deserves independent status because some types of complexity are not otherwise caught. For example, context that involves many different data types or multiple data structures may confuse the LLM. </text:span></text:p>
      <text:p text:style-name="P19"><text:span text:style-name="T28">Controls</text:span>: <text:span text:style-name="T31">Again, managing complexity is primarily a feature of architecture and ensuring that modules are carefully structured to control the number of data types and data structures that are sent to LLM endpoints.</text:span></text:p>
      <text:p text:style-name="P15"/>
      <text:p text:style-name="P20">Authority Ambiguity</text:p>
      <text:p text:style-name="P17">Who’s in charge?</text:p>
      <text:p text:style-name="P19"><text:span text:style-name="T28">Problem</text:span>: <text:span text:style-name="T35">Many times context will lack a clear hierarchy for resolving </text:span><text:span text:style-name="T36">in-context </text:span><text:span text:style-name="T35">authority conflicts. </text:span><text:span text:style-name="T36">For example, w</text:span><text:span text:style-name="T35">ithin a single piece of admitted context may live system prompts, user instructions, dynamically created prompts, and examples, but no statement about which is authoritative </text:span><text:span text:style-name="T36">over the others, for purposes of reasoning</text:span><text:span text:style-name="T35">.</text:span></text:p>
      <text:p text:style-name="P19"><text:span text:style-name="T28">Controls</text:span>: <text:span text:style-name="T36">Modules that execute prompt assembly should include clear instructions, including hierarchies of authority, </text:span><text:span text:style-name="T37">labeling, and</text:span><text:span text:style-name="T36"> precedence where relevant.</text:span></text:p>
      <text:p text:style-name="P15"/>
      <text:p text:style-name="P20">Compression Loss</text:p>
      <text:p text:style-name="P17">The summary ate the caveats.</text:p>
      <text:p text:style-name="P19"><text:span text:style-name="T28">Problem</text:span>: <text:span text:style-name="T36">In order to keep context within model ceilings, many agent harnesses will use compression: summaries or distillations of prior materials, memory, conversations, or documents. The problem arises when compression loses critical instructions that establish hierarchy of authority, reasoning rules, or limitations on scope. <text:s/></text:span></text:p>
      <text:p text:style-name="P19"><text:span text:style-name="T28">Controls</text:span>: <text:span text:style-name="T36">The solution is to ensure authoritative material, instructions, and limitations </text:span><text:span text:style-name="T37">are assigned a retention status</text:span><text:span text:style-name="T36"> </text:span><text:span text:style-name="T37">that is deterministically preserved (don’t rely on the AI to do it) in the event of compression. </text:span><text:span text:style-name="T36"><text:s/></text:span></text:p>
      <text:p text:style-name="P15"><text:soft-page-break/></text:p>
      <text:p text:style-name="P21">Semantic Drift Across Steps</text:p>
      <text:p text:style-name="P17">Whisper down the alley...<text:span text:style-name="T38">but </text:span>with tokens and at scale.</text:p>
      <text:p text:style-name="P19"><text:span text:style-name="T28">Problem</text:span>: <text:span text:style-name="T37">In a multi-step workflow that carries over inputs and outputs across </text:span><text:span text:style-name="T39">separate </text:span><text:span text:style-name="T37">calls to the LLM endpoint </text:span><text:span text:style-name="T39">may cause semantic boundaries to blur. The tentative becomes certain. Description becomes prescription. Or, a narrow task becomes a broad mandate. <text:s/></text:span><text:span text:style-name="T37"><text:s/></text:span></text:p>
      <text:p text:style-name="P22"><text:span text:style-name="T40">Controls</text:span><text:span text:style-name="T41">: </text:span><text:span text:style-name="T42">The system should preserve provenance and use “step contracts” for each turn of the workflow, so explicit instruction grounding the AI (“summarize only”, “do not classify”, or “extract claims but do not make your own conclusions.”)</text:span></text:p>
      <text:p text:style-name="P14"/>
      <text:p text:style-name="P21">Schema Overconfidence</text:p>
      <text:p text:style-name="P17">The JSON made me do it...</text:p>
      <text:p text:style-name="P19"><text:span text:style-name="T28">Problem</text:span>: <text:span text:style-name="T39">JSON </text:span><text:span text:style-name="T43">schema semantics</text:span><text:span text:style-name="T39"> (e.g. {“</text:span><text:span text:style-name="T43">risk</text:span><text:span text:style-name="T39">”: “</text:span><text:span text:style-name="T43">high</text:span><text:span text:style-name="T39">”</text:span><text:span text:style-name="T43">}) may obscure, or up-promote, or down-promote findings. Tentative AI responses might be lost in coarse or binary JSON categories.</text:span></text:p>
      <text:p text:style-name="P19"><text:span text:style-name="T28">Controls</text:span>: <text:span text:style-name="T43">JSON is indispensable in agentic development, but care should be taken in crafting schemas so that classification does not end up distorting model ouputs. <text:s/></text:span></text:p>
      <text:p text:style-name="P23"/>
      <text:p text:style-name="P24">Using AI When Deterministic Code is Reliable</text:p>
      <text:p text:style-name="P25">Hiring a poet to count beans.</text:p>
      <text:p text:style-name="P19"><text:span text:style-name="T28">Problem</text:span>: <text:span text:style-name="T43">Because LLMs are so highly performant and are </text:span><text:span text:style-name="T44">generally</text:span><text:span text:style-name="T43"> able to carry out a wide variety of quantitative and qualitative analysis, it is tempting to </text:span><text:span text:style-name="T44">rely</text:span><text:span text:style-name="T43"> on LLMs for such work. However, even a 1% failure rate, in a </text:span><text:span text:style-name="T3">sensitive use-case (healthcare, financial services, accounting) can be catastrophic.</text:span></text:p>
      <text:p text:style-name="P26"><text:span text:style-name="T28">Controls</text:span>: <text:span text:style-name="T3">If </text:span><text:span text:style-name="T43">the work to be done involves computation or other qualitative work/analysis and can be done with essentially 100% reliability by deterministic code (outputs not generated by an AI) then it is </text:span><text:span text:style-name="T3">much</text:span><text:span text:style-name="T43"> better to take that work “off the plate” of the LLM and have it scoped to be completed by deterministic code. </text:span><text:span text:style-name="T3">This not only increases the reliability of that particular work, but will also decrease the token burn rate of the system.</text:span></text:p>
      <text:p text:style-name="P27"/>
      <text:p text:style-name="P11">Conclusion: A Beginning</text:p>
      <text:p text:style-name="P28">Although hardening the trust boundaries around admitted context is essential, is is likely far from sufficient, especially for sensitive use-cases. <text:span text:style-name="T45">Other trust boundaries in agentic systems include the point at where the System ingests AI outputs. Here the approach works in reverse: just as the reasoning space (the LLM endpoint) is highly protected space in an agentic system, so is the rest of the agentic system as against AI outputs. <text:s/>AI outputs need to be evaluated for proper semantics, syntax, and safety.</text:span></text:p>
      <text:p text:style-name="P28"/>
      <text:p text:style-name="P29">It is also important to separate the controls that guard the trust boundary from the observational tools that evaluate the effectiveness of those controls. <text:s/>Trust boundary controls are not perfect and are <text:soft-page-break/>generally subject to improvement. Observational tools help to detect when controls fail as well as provide ideas for improvement.</text:p>
      <text:p text:style-name="P29"/>
      <text:p text:style-name="P30"><text:span text:style-name="T46">Trust boundaries for AI outputs and observational posts will be the subject of separate posts.</text:span></text:p>
      <text:p text:style-name="Text_20_body"/>
      <text:h text:style-name="P31" text:outline-level="2">Useful Resources</text:h>
      <text:p text:style-name="P32"/>
      <text:h text:style-name="P33" text:outline-level="3">Context performance, context rot, and reasoning degradation</text:h>
      <text:p text:style-name="P34">Anthropic. (n.d.). <text:span text:style-name="Emphasis">Reduce hallucinations</text:span>. Claude Platform Documentation. Accessed June 30, 2026. (<text:a xlink:type="simple" xlink:href="https://platform.claude.com/docs/en/test-and-evaluate/strengthen-guardrails/reduce-hallucinations" text:style-name="Internet_20_link" text:visited-style-name="Visited_20_Internet_20_Link">platform.claude.com</text:a>)</text:p>
      <text:p text:style-name="P34">Anthropic Applied AI Team. (September 29, 2025). <text:span text:style-name="Emphasis">Effective context engineering for AI agents</text:span>. Anthropic Engineering. (<text:a xlink:type="simple" xlink:href="https://www.anthropic.com/engineering/effective-context-engineering-for-ai-agents" text:style-name="Internet_20_link" text:visited-style-name="Visited_20_Internet_20_Link">anthropic.com</text:a>)</text:p>
      <text:p text:style-name="P34">Hong, Kelly; Troynikov, Anton; &amp; Huber, Jeff. (July 14, 2025). <text:span text:style-name="Emphasis">Context Rot: How Increasing Input Tokens Impacts LLM Performance</text:span>. Chroma Research. (<text:a xlink:type="simple" xlink:href="https://www.trychroma.com/research/context-rot" text:style-name="Internet_20_link" text:visited-style-name="Visited_20_Internet_20_Link">trychroma.com</text:a>)</text:p>
      <text:p text:style-name="P34">Laban, Philippe; Hayashi, Hiroaki; Zhou, Yingbo; &amp; Neville, Jennifer. (May 9, 2025). <text:span text:style-name="Emphasis">LLMs get lost in multi-turn conversation</text:span>. arXiv. (<text:a xlink:type="simple" xlink:href="https://arxiv.org/abs/2505.06120" text:style-name="Internet_20_link" text:visited-style-name="Visited_20_Internet_20_Link">arxiv.org</text:a>)</text:p>
      <text:p text:style-name="P34">Li, Zihao; Yi, Weiwei; &amp; Chen, Jiahong. (July 2026). <text:span text:style-name="Emphasis">Accuracy paradox: Addressing epistemic, manipulative, and societal risks of hallucination in AI governance</text:span>. Computer Law &amp; Security Review, 61, Article 106311. (<text:a xlink:type="simple" xlink:href="https://www.sciencedirect.com/science/article/pii/S2212473X26000520" text:style-name="Internet_20_link" text:visited-style-name="Visited_20_Internet_20_Link">sciencedirect.com</text:a>)</text:p>
      <text:p text:style-name="P34">OpenAI. (September 5, 2025). <text:span text:style-name="Emphasis">Why language models hallucinate</text:span>. OpenAI Research. (<text:a xlink:type="simple" xlink:href="https://openai.com/index/why-language-models-hallucinate/" text:style-name="Internet_20_link" text:visited-style-name="Visited_20_Internet_20_Link">openai.com</text:a>)</text:p>
      <text:p text:style-name="P34">Tam, Zhi Rui; Wu, Cheng-Kuang; Tsai, Yi-Lin; Lin, Chieh-Yen; Lee, Hung-yi; &amp; Chen, Yun-Nung. (2024). <text:span text:style-name="Emphasis">Let Me Speak Freely? A study on the impact of format restrictions on large language model performance</text:span>. Proceedings of the 2024 Conference on Empirical Methods in Natural Language Processing: Industry Track, 1218–1236. (<text:a xlink:type="simple" xlink:href="https://aclanthology.org/2024.emnlp-industry.91/" text:style-name="Internet_20_link" text:visited-style-name="Visited_20_Internet_20_Link">aclanthology.org</text:a>)</text:p>
      <text:p text:style-name="P34">OpenAI. (December 18, 2025). <text:span text:style-name="Emphasis">Model Spec</text:span>. OpenAI. (<text:a xlink:type="simple" xlink:href="https://model-spec.openai.com/" text:style-name="Internet_20_link" text:visited-style-name="Visited_20_Internet_20_Link">model-spec.openai.com</text:a>)</text:p>
      <text:h text:style-name="P35" text:outline-level="3"><text:span text:style-name="T47">Prompt injection, instruction/data confusion, and adversarial context</text:span></text:h>
      <text:p text:style-name="P34">Liu, Yupei; Jia, Yuqi; Geng, Runpeng; Jia, Jinyuan; &amp; Gong, Neil Zhenqiang. (2024). <text:span text:style-name="Emphasis">Formalizing and benchmarking prompt injection attacks and defenses</text:span>. Proceedings of the 33rd USENIX Security Symposium, 1831–1847. (<text:a xlink:type="simple" xlink:href="https://pure.psu.edu/en/publications/formalizing-and-benchmarking-prompt-injection-attacks-and-defense/" text:style-name="Internet_20_link" text:visited-style-name="Visited_20_Internet_20_Link">pure.psu.edu</text:a>)</text:p>
      <text:p text:style-name="P34">Schulhoff, Sander, et al. (June 6, 2024). <text:span text:style-name="Emphasis">The Prompt Report: A systematic survey of prompting techniques</text:span>. arXiv. (<text:a xlink:type="simple" xlink:href="https://arxiv.org/abs/2406.06608" text:style-name="Internet_20_link" text:visited-style-name="Visited_20_Internet_20_Link">arxiv.org</text:a>)</text:p>
      <text:p text:style-name="P34"><text:soft-page-break/>Shen, Xinyue; Chen, Zeyuan; Backes, Michael; Shen, Yun; &amp; Zhang, Yang. (2024). <text:span text:style-name="Emphasis">“Do Anything Now”: Characterizing and evaluating in-the-wild jailbreak prompts on large language models</text:span>. Proceedings of the ACM Conference on Computer and Communications Security. (<text:a xlink:type="simple" xlink:href="https://dl.acm.org/doi/10.1145/3658644.3670388" text:style-name="Internet_20_link" text:visited-style-name="Visited_20_Internet_20_Link">dl.acm.org</text:a>)</text:p>
      <text:p text:style-name="P34"/>
      <text:h text:style-name="P33" text:outline-level="3">OWASP AI, LLM, and agentic-system security sources</text:h>
      <text:p text:style-name="P34">OWASP Foundation. (November 18, 2024). <text:span text:style-name="Emphasis">OWASP Top 10 for LLM Applications 2025</text:span>. OWASP GenAI Security Project. (<text:a xlink:type="simple" xlink:href="https://owasp.org/www-project-top-10-for-large-language-model-applications/assets/PDF/OWASP-Top-10-for-LLMs-v2025.pdf" text:style-name="Internet_20_link" text:visited-style-name="Visited_20_Internet_20_Link">owasp.org</text:a>)</text:p>
      <text:p text:style-name="P34">OWASP GenAI Security Project. (2025). <text:span text:style-name="Emphasis">LLM01:2025 Prompt Injection</text:span>. OWASP. (<text:a xlink:type="simple" xlink:href="https://genai.owasp.org/llmrisk/llm01-prompt-injection/" text:style-name="Internet_20_link" text:visited-style-name="Visited_20_Internet_20_Link">genai.owasp.org</text:a>)</text:p>
      <text:p text:style-name="P34">OWASP GenAI Security Project. (2025). <text:span text:style-name="Emphasis">LLM05:2025 Improper Output Handling</text:span>. OWASP. (<text:a xlink:type="simple" xlink:href="https://genai.owasp.org/llmrisk/llm05-supply-chain-vulnerabilities/" text:style-name="Internet_20_link" text:visited-style-name="Visited_20_Internet_20_Link">genai.owasp.org</text:a>)</text:p>
      <text:p text:style-name="P34">OWASP GenAI Security Project. (2025). <text:span text:style-name="Emphasis">LLM09:2025 Misinformation</text:span>. OWASP. (<text:a xlink:type="simple" xlink:href="https://genai.owasp.org/llm-top-10/" text:style-name="Internet_20_link" text:visited-style-name="Visited_20_Internet_20_Link">genai.owasp.org</text:a>)</text:p>
      <text:p text:style-name="P34">OWASP GenAI Security Project. (February 17, 2025). <text:span text:style-name="Emphasis">Agentic AI — Threats and Mitigations</text:span>. OWASP. (<text:a xlink:type="simple" xlink:href="https://genai.owasp.org/resource/agentic-ai-threats-and-mitigations/" text:style-name="Internet_20_link" text:visited-style-name="Visited_20_Internet_20_Link">genai.owasp.org</text:a>)</text:p>
      <text:p text:style-name="P34">OWASP GenAI Security Project. (April 23, 2025). <text:span text:style-name="Emphasis">Multi-Agentic System Threat Modeling Guide v1.0</text:span>. OWASP. (<text:a xlink:type="simple" xlink:href="https://genai.owasp.org/resource/multi-agentic-system-threat-modeling-guide-v1-0/" text:style-name="Internet_20_link" text:visited-style-name="Visited_20_Internet_20_Link">genai.owasp.org</text:a>)</text:p>
      <text:p text:style-name="P34">OWASP GenAI Security Project. (July 27, 2025). <text:span text:style-name="Emphasis">Securing Agentic Applications Guide 1.0</text:span>. OWASP. (<text:a xlink:type="simple" xlink:href="https://genai.owasp.org/resource/securing-agentic-applications-guide-1-0/" text:style-name="Internet_20_link" text:visited-style-name="Visited_20_Internet_20_Link">genai.owasp.org</text:a>)</text:p>
      <text:p text:style-name="P34"/>
      <text:h text:style-name="P33" text:outline-level="3">NIST, government, and standards sources for AI trust boundaries and governance</text:h>
      <text:p text:style-name="P34">Autio, C.; Schwartz, R.; Eikermann, M.; Gregory, R.; &amp; others. (July 26, 2024). <text:span text:style-name="Emphasis">Artificial Intelligence Risk Management Framework: Generative Artificial Intelligence Profile</text:span>. NIST AI 600-1. National Institute of Standards and Technology. (<text:a xlink:type="simple" xlink:href="https://www.nist.gov/publications/artificial-intelligence-risk-management-framework-generative-artificial-intelligence" text:style-name="Internet_20_link" text:visited-style-name="Visited_20_Internet_20_Link">nist.gov</text:a>)</text:p>
      <text:p text:style-name="P34">Tabassi, Elham, et al. (January 26, 2023). <text:span text:style-name="Emphasis">Artificial Intelligence Risk Management Framework (AI RMF 1.0)</text:span>. NIST AI 100-1. National Institute of Standards and Technology. (<text:a xlink:type="simple" xlink:href="https://www.nist.gov/publications/artificial-intelligence-risk-management-framework-ai-rmf-10" text:style-name="Internet_20_link" text:visited-style-name="Visited_20_Internet_20_Link">nist.gov</text:a>)</text:p>
      <text:p text:style-name="P34"/>
      <text:h text:style-name="P33" text:outline-level="3">Other useful trust-boundary, containment, and AI-system governance sources</text:h>
      <text:p text:style-name="P34">Anthropic. (May 25, 2026). <text:span text:style-name="Emphasis">How we contain Claude across products</text:span>. Anthropic Engineering. (<text:a xlink:type="simple" xlink:href="https://www.anthropic.com/engineering/how-we-contain-claude" text:style-name="Internet_20_link" text:visited-style-name="Visited_20_Internet_20_Link">anthropic.com</text:a>)</text:p>
      <text:p text:style-name="P34">Cloud Security Alliance. (February 6, 2025). <text:span text:style-name="Emphasis">Agentic AI Threat Modeling Framework: MAESTRO</text:span>. Cloud Security Alliance. (<text:a xlink:type="simple" xlink:href="https://cloudsecurityalliance.org/blog/2025/02/06/agentic-ai-threat-modeling-framework-maestro" text:style-name="Internet_20_link" text:visited-style-name="Visited_20_Internet_20_Link">cloudsecurityalliance.org</text:a>)</text:p>
      <text:p text:style-name="P34"><text:soft-page-break/></text:p>
      <text:p text:style-name="P34">MITRE. (n.d.). <text:span text:style-name="Emphasis">MITRE ATLAS™: Adversarial Threat Landscape for Artificial-Intelligence Systems</text:span>. MITRE. Accessed July 6, 2026. (<text:a xlink:type="simple" xlink:href="https://atlas.mitre.org/" text:style-name="Internet_20_link" text:visited-style-name="Visited_20_Internet_20_Link">atlas.mitre.org</text:a>)</text:p>
      <text:p text:style-name="P36"/>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Google Sans Text" svg:font-family="'Google Sans Text'"/>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04T17:42:41.695968000</meta:creation-date>
    <dc:date>2026-07-06T16:23:25.644415000</dc:date>
    <meta:editing-duration>PT1H29M6S</meta:editing-duration>
    <meta:editing-cycles>16</meta:editing-cycles>
    <meta:generator>LibreOffice/26.2.1.2$MacOSX_AARCH64 LibreOffice_project/8399f6259d8c87f40e7255cdb3c9b958f5e08948</meta:generator>
    <meta:document-statistic meta:table-count="0" meta:image-count="0" meta:object-count="0" meta:page-count="7" meta:paragraph-count="80" meta:word-count="2154" meta:character-count="14563" meta:non-whitespace-character-count="12472"/>
  </office:meta>
</office:document-meta>
</file>